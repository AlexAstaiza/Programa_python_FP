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fb4f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01efb4f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text-properties officeooo:rsid="001fad82" officeooo:paragraph-rsid="001fad82"/>
    </style:style>
    <style:style style:name="P4" style:family="paragraph" style:parent-style-name="Standard">
      <style:text-properties officeooo:rsid="0021970a" officeooo:paragraph-rsid="0021970a"/>
    </style:style>
    <style:style style:name="P5" style:family="paragraph" style:parent-style-name="Standard">
      <style:text-properties officeooo:rsid="00230593" officeooo:paragraph-rsid="00230593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fb4f"/>
    </style:style>
    <style:style style:name="P7" style:family="paragraph" style:parent-style-name="Standard">
      <style:paragraph-properties fo:text-align="center" style:justify-single-word="false"/>
      <style:text-properties officeooo:paragraph-rsid="001efb4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officeooo:paragraph-rsid="001efb4f" style:font-size-asian="12pt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efb4f" officeooo:paragraph-rsid="001efb4f" fo:background-color="transparen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officeooo:rsid="00280b29" officeooo:paragraph-rsid="00280b29" fo:background-color="transparen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efb4f" officeooo:paragraph-rsid="001efb4f"/>
    </style:style>
    <style:style style:name="P12" style:family="paragraph" style:parent-style-name="Standard">
      <style:text-properties officeooo:rsid="0021970a" officeooo:paragraph-rsid="001fad82"/>
    </style:style>
    <style:style style:name="P13" style:family="paragraph" style:parent-style-name="Table_20_Contents">
      <style:text-properties officeooo:rsid="0017ec38" officeooo:paragraph-rsid="0017ec38"/>
    </style:style>
    <style:style style:name="P14" style:family="paragraph" style:parent-style-name="Table_20_Contents">
      <style:text-properties officeooo:rsid="002a1e86" officeooo:paragraph-rsid="002a1e86"/>
    </style:style>
    <style:style style:name="P15" style:family="paragraph" style:parent-style-name="Text_20_body">
      <style:text-properties officeooo:rsid="001fad82" officeooo:paragraph-rsid="001efb4f"/>
    </style:style>
    <style:style style:name="P16" style:family="paragraph" style:parent-style-name="Text_20_body">
      <style:text-properties officeooo:rsid="002a1e86" officeooo:paragraph-rsid="002a1e86"/>
    </style:style>
    <style:style style:name="T1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2" style:family="text">
      <style:text-properties style:font-name="Times New Roman" fo:font-size="12pt" officeooo:rsid="001efb4f" style:font-size-asian="12pt" style:font-name-complex="Times New Roman1" style:font-size-complex="12pt" style:font-weight-complex="bold"/>
    </style:style>
    <style:style style:name="T3" style:family="text">
      <style:text-properties style:font-name="Times New Roman" fo:font-size="12pt" officeooo:rsid="00280b29" style:font-size-asian="12pt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name-asian="Times New Roman1" style:font-size-asian="12pt" style:language-asian="es" style:country-asian="CO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280b29" style:font-name-asian="Times New Roman1" style:font-size-asian="12pt" style:language-asian="es" style:country-asian="CO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background-color="transparent" loext:char-shading-value="0" style:font-size-asian="12pt" style:font-name-complex="Times New Roman1" style:font-size-complex="12pt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color="#000000" loext:opacity="100%" style:font-name="Times New Roman" fo:font-size="12pt" fo:font-style="normal" style:text-underline-style="none" style:font-size-asian="12pt" style:font-style-asian="normal" style:font-name-complex="Times New Roman1" style:font-size-complex="12pt" style:font-style-complex="normal" style:font-weight-complex="bold"/>
    </style:style>
    <style:style style:name="T9" style:family="text">
      <style:text-properties fo:color="#000000" loext:opacity="100%" style:font-name="Times New Roman" fo:font-size="12pt" fo:font-style="normal" style:text-underline-style="none" officeooo:rsid="00280b29" style:font-size-asian="12pt" style:font-style-asian="normal" style:font-name-complex="Times New Roman1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Tarea </text:span><text:span text:style-name="T5">5. Tarea fina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 loext:marker-style-name="T1"><text:span text:style-name="T1">Presentado por:</text:span></text:p>
      <text:p text:style-name="P1" loext:marker-style-name="T7"><text:span text:style-name="T7">Alex David Astaiza Ceron</text:span></text:p>
      <text:p text:style-name="P8" loext:marker-style-name="T1"/>
      <text:p text:style-name="P1" loext:marker-style-name="T1"><text:span text:style-name="T2">E</text:span><text:span text:style-name="T1">jercicios a resolver</text:span></text:p>
      <text:p text:style-name="P9" loext:marker-style-name="T1"><text:span text:style-name="T8">Ejercicio </text:span><text:span text:style-name="T9">1</text:span></text:p>
      <text:p text:style-name="P8" loext:marker-style-name="T1"/>
      <text:p text:style-name="P8" loext:marker-style-name="T1"/>
      <text:p text:style-name="P8" loext:marker-style-name="T1"/>
      <text:p text:style-name="P1" loext:marker-style-name="T1"><text:span text:style-name="T6"/></text:p>
      <text:p text:style-name="P11" loext:marker-style-name="T1"><text:span text:style-name="T6">Fundamentos de Programación</text:span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1" loext:marker-style-name="T1"><text:span text:style-name="T1">Presentado a: </text:span></text:p>
      <text:p text:style-name="P10" loext:marker-style-name="T1"><text:span text:style-name="T1">Diomar antonio pineda cervantes</text:span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7" loext:marker-style-name="T1"><text:span text:style-name="T1">Universidad Nacional Abierta y a Distancia -UNAD<text:line-break/>Escuela de Ciencias Básica, Tecnologías e Ingenierías – ECBTI<text:line-break/></text:span><text:span text:style-name="T3">20</text:span><text:span text:style-name="T1"> de ma</text:span><text:span text:style-name="T3">yo</text:span><text:span text:style-name="T1"> de 2026</text:span></text:p>
      <text:p text:style-name="Text_20_body"><text:soft-page-break/></text:p>
      <text:p text:style-name="P16">Tabla de requerimientos</text:p>
      <text:p text:style-name="P16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3">Identificación del requerimiento </text:p>
          </table:table-cell>
          <table:table-cell table:style-name="Tabla1.A1" office:value-type="string">
            <text:p text:style-name="P13">Descripción</text:p>
          </table:table-cell>
          <table:table-cell table:style-name="Tabla1.A1" office:value-type="string">
            <text:p text:style-name="P13">Entradas</text:p>
          </table:table-cell>
          <table:table-cell table:style-name="Tabla1.A1" office:value-type="string">
            <text:p text:style-name="P13">Resultados o salidas</text:p>
          </table:table-cell>
        </table:table-row>
        <table:table-row>
          <table:table-cell table:style-name="Tabla1.A1" office:value-type="string">
            <text:p text:style-name="P14">R1</text:p>
          </table:table-cell>
          <table:table-cell table:style-name="Tabla1.A1" office:value-type="string">
            <text:p text:style-name="P14">Se crea la matriz sesiones con datos de clientes</text:p>
          </table:table-cell>
          <table:table-cell table:style-name="Tabla1.A1" office:value-type="string">
            <text:p text:style-name="P14">Datos fijos definidos </text:p>
          </table:table-cell>
          <table:table-cell table:style-name="Tabla1.A1" office:value-type="string">
            <text:p text:style-name="P14">Matriz inicializada para ser procesada</text:p>
          </table:table-cell>
        </table:table-row>
        <table:table-row>
          <table:table-cell table:style-name="Tabla1.A1" office:value-type="string">
            <text:p text:style-name="P14">R2</text:p>
          </table:table-cell>
          <table:table-cell table:style-name="Tabla1.A1" office:value-type="string">
            <text:p text:style-name="P14">Se define la funcion clasificar_sesion() que evalua el nivel de compromiso de una sesion</text:p>
          </table:table-cell>
          <table:table-cell table:style-name="Tabla1.A1" office:value-type="string">
            <text:p text:style-name="P14">Dos números enteros duracion y clics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16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onclusiones</text:p>
      <text:p text:style-name="P5"/>
      <text:p text:style-name="P5">Como conclusion el programa es capaz de interactuar con el ususario y calcular el valor final del producto según la categoria, asi como tambien detectar cuando un valor es invalido o nul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5:51:09.642079726</meta:creation-date>
    <dc:date>2026-05-20T22:06:58.272745249</dc:date>
    <meta:editing-duration>PT33M34S</meta:editing-duration>
    <meta:editing-cycles>7</meta:editing-cycles>
    <meta:generator>LibreOffice/24.2.7.2$Linux_X86_64 LibreOffice_project/420$Build-2</meta:generator>
    <meta:document-statistic meta:table-count="1" meta:image-count="0" meta:object-count="0" meta:page-count="3" meta:paragraph-count="23" meta:word-count="127" meta:character-count="823" meta:non-whitespace-character-count="714"/>
  </office:meta>
</office:document-meta>
</file>